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text-shadow="0.0145in 0.0145in 0.0416in #000000" fo:color="#000000" fo:font-size="40pt" style:font-size-asian="40pt" style:font-size-complex="40pt" fo:language="fr" fo:country="DZ"/>
    </style:style>
    <style:style style:name="P2" style:parent-style-name="Normal" style:family="paragraph">
      <style:text-properties fo:language="fr" fo:country="DZ"/>
    </style:style>
    <style:style style:name="T3" style:parent-style-name="Policepardéfaut" style:family="text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T4" style:parent-style-name="Policepardéfaut" style:family="text">
      <style:text-properties fo:color="#5B9BD5" fo:font-size="14pt" style:font-size-asian="14pt" style:font-size-complex="14pt" fo:language="fr" fo:country="DZ"/>
    </style:style>
    <style:style style:name="T5" style:parent-style-name="Policepardéfaut" style:family="text">
      <style:text-properties fo:font-size="14pt" style:font-size-asian="14pt" style:font-size-complex="14pt" fo:language="fr" fo:country="DZ"/>
    </style:style>
    <style:style style:name="P6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7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8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9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10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11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12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13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14" style:parent-style-name="Normal" style:family="paragraph">
      <style:text-properties fo:font-size="14pt" style:font-size-asian="14pt" style:font-size-complex="14pt" fo:language="fr" fo:country="DZ"/>
    </style:style>
    <style:style style:name="P15" style:parent-style-name="Normal" style:family="paragraph">
      <style:text-properties fo:font-size="14pt" style:font-size-asian="14pt" style:font-size-complex="14pt" fo:language="fr" fo:country="DZ"/>
    </style:style>
    <style:style style:name="P16" style:parent-style-name="Normal" style:family="paragraph">
      <style:text-properties fo:font-size="14pt" style:font-size-asian="14pt" style:font-size-complex="14pt" fo:language="fr" fo:country="DZ"/>
    </style:style>
    <style:style style:name="P17" style:parent-style-name="Normal" style:family="paragraph">
      <style:text-properties fo:font-size="14pt" style:font-size-asian="14pt" style:font-size-complex="14pt" fo:language="fr" fo:country="DZ"/>
    </style:style>
    <style:style style:name="P18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19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20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1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2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3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4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26" style:parent-style-name="Paragraphedeliste" style:list-style-name="LFO1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7" style:parent-style-name="Paragraphedeliste" style:list-style-name="LFO1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8" style:parent-style-name="Paragraphedeliste" style:list-style-name="LFO1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9" style:parent-style-name="Paragraphedeliste" style:list-style-name="LFO1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30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32" style:parent-style-name="Normal" style:list-style-name="LFO9" style:family="paragraph">
      <style:text-properties fo:font-size="14pt" style:font-size-asian="14pt" style:font-size-complex="14pt" fo:language="fr" fo:country="DZ"/>
    </style:style>
    <style:style style:name="P33" style:parent-style-name="Normal" style:list-style-name="LFO9" style:family="paragraph">
      <style:text-properties fo:font-size="14pt" style:font-size-asian="14pt" style:font-size-complex="14pt" fo:language="fr" fo:country="DZ"/>
    </style:style>
    <style:style style:name="P34" style:parent-style-name="Normal" style:family="paragraph">
      <style:paragraph-properties fo:margin-left="1in">
        <style:tab-stops/>
      </style:paragraph-properties>
    </style:style>
    <style:style style:name="T35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T36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T37" style:parent-style-name="Policepardéfaut" style:family="text">
      <style:text-properties fo:font-size="14pt" style:font-size-asian="14pt" style:font-size-complex="14pt" fo:language="fr" fo:country="DZ"/>
    </style:style>
    <style:style style:name="P38" style:parent-style-name="Normal" style:family="paragraph">
      <style:paragraph-properties fo:margin-left="1in">
        <style:tab-stops/>
      </style:paragraph-properties>
    </style:style>
    <style:style style:name="T39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T40" style:parent-style-name="Policepardéfaut" style:family="text">
      <style:text-properties fo:font-size="14pt" style:font-size-asian="14pt" style:font-size-complex="14pt" fo:language="fr" fo:country="DZ"/>
    </style:style>
    <style:style style:name="P41" style:parent-style-name="Normal" style:family="paragraph">
      <style:paragraph-properties fo:margin-left="1in">
        <style:tab-stops/>
      </style:paragraph-properties>
    </style:style>
    <style:style style:name="T42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T43" style:parent-style-name="Policepardéfaut" style:family="text">
      <style:text-properties fo:font-size="14pt" style:font-size-asian="14pt" style:font-size-complex="14pt" fo:language="fr" fo:country="DZ"/>
    </style:style>
    <style:style style:name="P44" style:parent-style-name="Normal" style:list-style-name="LFO9" style:family="paragraph">
      <style:text-properties fo:font-size="14pt" style:font-size-asian="14pt" style:font-size-complex="14pt" fo:language="fr" fo:country="DZ"/>
    </style:style>
    <style:style style:name="P45" style:parent-style-name="Normal" style:list-style-name="LFO9" style:family="paragraph">
      <style:text-properties fo:font-size="14pt" style:font-size-asian="14pt" style:font-size-complex="14pt" fo:language="fr" fo:country="DZ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47" style:parent-style-name="Paragraphedeliste" style:list-style-name="LFO16" style:family="paragraph">
      <style:text-properties fo:font-size="14pt" style:font-size-asian="14pt" style:font-size-complex="14pt" fo:language="fr" fo:country="DZ"/>
    </style:style>
    <style:style style:name="P48" style:parent-style-name="Paragraphedeliste" style:list-style-name="LFO16" style:family="paragraph">
      <style:text-properties fo:font-size="14pt" style:font-size-asian="14pt" style:font-size-complex="14pt" fo:language="fr" fo:country="DZ"/>
    </style:style>
    <style:style style:name="P49" style:parent-style-name="Paragraphedeliste" style:list-style-name="LFO16" style:family="paragraph">
      <style:text-properties fo:font-size="14pt" style:font-size-asian="14pt" style:font-size-complex="14pt" fo:language="fr" fo:country="DZ"/>
    </style:style>
    <style:style style:name="P50" style:parent-style-name="Paragraphedeliste" style:list-style-name="LFO16" style:family="paragraph">
      <style:text-properties fo:font-size="14pt" style:font-size-asian="14pt" style:font-size-complex="14pt" fo:language="fr" fo:country="DZ"/>
    </style:style>
    <style:style style:name="P51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52" style:parent-style-name="Normal" style:list-style-name="LFO11" style:family="paragraph">
      <style:text-properties fo:font-size="14pt" style:font-size-asian="14pt" style:font-size-complex="14pt" fo:language="fr" fo:country="DZ"/>
    </style:style>
    <style:style style:name="P53" style:parent-style-name="Normal" style:list-style-name="LFO11" style:family="paragraph">
      <style:text-properties fo:font-size="14pt" style:font-size-asian="14pt" style:font-size-complex="14pt" fo:language="fr" fo:country="DZ"/>
    </style:style>
    <style:style style:name="P54" style:parent-style-name="Normal" style:list-style-name="LFO11" style:family="paragraph">
      <style:text-properties fo:font-size="14pt" style:font-size-asian="14pt" style:font-size-complex="14pt" fo:language="fr" fo:country="DZ"/>
    </style:style>
    <style:style style:name="P55" style:parent-style-name="Normal" style:list-style-name="LFO11" style:family="paragraph">
      <style:text-properties fo:font-size="14pt" style:font-size-asian="14pt" style:font-size-complex="14pt" fo:language="fr" fo:country="DZ"/>
    </style:style>
    <style:style style:name="P56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57" style:parent-style-name="Normal" style:list-style-name="LFO12" style:family="paragraph">
      <style:text-properties fo:font-size="14pt" style:font-size-asian="14pt" style:font-size-complex="14pt" fo:language="fr" fo:country="DZ"/>
    </style:style>
    <style:style style:name="P58" style:parent-style-name="Normal" style:list-style-name="LFO12" style:family="paragraph">
      <style:text-properties fo:font-size="14pt" style:font-size-asian="14pt" style:font-size-complex="14pt" fo:language="fr" fo:country="DZ"/>
    </style:style>
    <style:style style:name="P59" style:parent-style-name="Normal" style:list-style-name="LFO12" style:family="paragraph">
      <style:text-properties fo:font-size="14pt" style:font-size-asian="14pt" style:font-size-complex="14pt" fo:language="fr" fo:country="DZ"/>
    </style:style>
    <style:style style:name="P60" style:parent-style-name="Normal" style:list-style-name="LFO12" style:family="paragraph">
      <style:text-properties fo:font-size="14pt" style:font-size-asian="14pt" style:font-size-complex="14pt" fo:language="fr" fo:country="DZ"/>
    </style:style>
    <style:style style:name="P61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62" style:parent-style-name="Normal" style:list-style-name="LFO13" style:family="paragraph">
      <style:text-properties fo:font-size="14pt" style:font-size-asian="14pt" style:font-size-complex="14pt" fo:language="fr" fo:country="DZ"/>
    </style:style>
    <style:style style:name="P63" style:parent-style-name="Normal" style:list-style-name="LFO13" style:family="paragraph">
      <style:text-properties fo:font-size="14pt" style:font-size-asian="14pt" style:font-size-complex="14pt" fo:language="fr" fo:country="DZ"/>
    </style:style>
    <style:style style:name="P64" style:parent-style-name="Normal" style:list-style-name="LFO13" style:family="paragraph">
      <style:text-properties fo:font-size="14pt" style:font-size-asian="14pt" style:font-size-complex="14pt" fo:language="fr" fo:country="DZ"/>
    </style:style>
    <style:style style:name="T65" style:parent-style-name="Policepardéfaut" style:family="text">
      <style:text-properties fo:font-weight="bold" style:font-weight-asian="bold" style:font-weight-complex="bold" fo:color="#5B9BD5" fo:font-size="14pt" style:font-size-asian="14pt" style:font-size-complex="14pt"/>
    </style:style>
    <style:style style:name="T66" style:parent-style-name="Policepardéfaut" style:family="text">
      <style:text-properties fo:font-weight="bold" style:font-weight-asian="bold" style:font-weight-complex="bold" fo:color="#5B9BD5" fo:font-size="14pt" style:font-size-asian="14pt" style:font-size-complex="14pt"/>
    </style:style>
    <style:style style:name="T67" style:parent-style-name="Policepardéfaut" style:family="text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68" style:parent-style-name="Paragraphedeliste" style:list-style-name="LFO6" style:family="paragraph">
      <style:paragraph-properties fo:line-height="150%"/>
      <style:text-properties fo:font-size="14pt" style:font-size-asian="14pt" style:font-size-complex="14pt" fo:language="fr" fo:country="DZ"/>
    </style:style>
    <style:style style:name="P69" style:parent-style-name="Paragraphedeliste" style:list-style-name="LFO6" style:family="paragraph">
      <style:paragraph-properties fo:line-height="150%"/>
      <style:text-properties fo:font-size="14pt" style:font-size-asian="14pt" style:font-size-complex="14pt" fo:language="fr" fo:country="DZ"/>
    </style:style>
    <style:style style:name="P70" style:parent-style-name="Paragraphedeliste" style:list-style-name="LFO6" style:family="paragraph">
      <style:paragraph-properties fo:line-height="150%"/>
      <style:text-properties fo:font-size="14pt" style:font-size-asian="14pt" style:font-size-complex="14pt" fo:language="fr" fo:country="DZ"/>
    </style:style>
    <style:style style:name="P71" style:parent-style-name="Paragraphedeliste" style:list-style-name="LFO6" style:family="paragraph">
      <style:paragraph-properties fo:line-height="150%"/>
      <style:text-properties fo:font-size="14pt" style:font-size-asian="14pt" style:font-size-complex="14pt" fo:language="fr" fo:country="DZ"/>
    </style:style>
    <style:style style:name="P72" style:parent-style-name="Paragraphedeliste" style:list-style-name="LFO6" style:family="paragraph">
      <style:paragraph-properties fo:line-height="150%"/>
      <style:text-properties fo:font-size="14pt" style:font-size-asian="14pt" style:font-size-complex="14pt" fo:language="fr" fo:country="DZ"/>
    </style:style>
    <style:style style:name="P73" style:parent-style-name="Paragraphedeliste" style:list-style-name="LFO6" style:family="paragraph">
      <style:paragraph-properties fo:line-height="150%"/>
    </style:style>
    <style:style style:name="T74" style:parent-style-name="Policepardéfaut" style:family="text">
      <style:text-properties fo:font-size="14pt" style:font-size-asian="14pt" style:font-size-complex="14pt" fo:language="fr" fo:country="DZ"/>
    </style:style>
    <style:style style:name="T75" style:parent-style-name="Policepardéfaut" style:family="text">
      <style:text-properties fo:font-weight="bold" style:font-weight-asian="bold" style:font-weight-complex="bold" fo:color="#5B9BD5" fo:font-size="14pt" style:font-size-asian="14pt" style:font-size-complex="14pt"/>
    </style:style>
    <style:style style:name="T76" style:parent-style-name="Policepardéfaut" style:family="text">
      <style:text-properties fo:font-weight="bold" style:font-weight-asian="bold" style:font-weight-complex="bold" fo:color="#5B9BD5" fo:font-size="14pt" style:font-size-asian="14pt" style:font-size-complex="14pt"/>
    </style:style>
    <style:style style:name="T77" style:parent-style-name="Policepardéfaut" style:family="text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78" style:parent-style-name="Paragraphedeliste" style:list-style-name="LFO1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79" style:parent-style-name="Paragraphedeliste" style:list-style-name="LFO1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80" style:parent-style-name="Paragraphedeliste" style:list-style-name="LFO1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81" style:parent-style-name="Paragraphedeliste" style:list-style-name="LFO1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82" style:parent-style-name="Paragraphedeliste" style:list-style-name="LFO1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83" style:parent-style-name="Paragraphedeliste" style:list-style-name="LFO1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84" style:parent-style-name="Paragraphedeliste" style:list-style-name="LFO18" style:family="paragraph">
      <style:paragraph-properties fo:line-height="150%"/>
    </style:style>
    <style:style style:name="T85" style:parent-style-name="Policepardéfaut" style:family="text">
      <style:text-properties fo:font-size="14pt" style:font-size-asian="14pt" style:font-size-complex="14pt" fo:language="fr" fo:country="DZ"/>
    </style:style>
    <style:style style:name="P86" style:parent-style-name="Normal" style:family="paragraph">
      <style:paragraph-properties fo:line-height="150%"/>
    </style:style>
  </office:automatic-styles>
  <office:body>
    <office:text text:use-soft-page-breaks="true">
      <text:p text:style-name="P1">Projet Médiathèque</text:p>
      <text:p text:style-name="P2"/>
      <text:p text:style-name="Normal"><text:span text:style-name="T3">Nom du projet:</text:span><text:span text:style-name="T4"><text:s/></text:span><text:span text:style-name="T5">Médiathèque</text:span></text:p>
      <text:p text:style-name="P6">Objectif du projet:</text:p>
      <text:list text:style-name="LFO7" text:continue-numbering="true">
        <text:list-item>
          <text:p text:style-name="P7">Mettre en place une application web centralisée</text:p>
        </text:list-item>
        <text:list-item>
          <text:p text:style-name="P8">Gérer les utilisateurs (Super Admin, Admin, Adhérents)</text:p>
        </text:list-item>
        <text:list-item>
          <text:p text:style-name="P9">Gérer les documents (livres, DVD, CD…)</text:p>
        </text:list-item>
        <text:list-item>
          <text:p text:style-name="P10">Automatiser la gestion des emprunts et retours</text:p>
        </text:list-item>
        <text:list-item>
          <text:p text:style-name="P11">Sécuriser et centraliser les données</text:p>
        </text:list-item>
        <text:list-item>
          <text:p text:style-name="P12">Améliorer la traçabilité des opérations</text:p>
        </text:list-item>
      </text:list>
      <text:p text:style-name="P13">Technologies utilisées:</text:p>
      <text:p text:style-name="P14">HTML5 → Structure du contenu</text:p>
      <text:p text:style-name="P15">CSS3 → Mise en forme et design responsive</text:p>
      <text:p text:style-name="P16">PHP → Logique métier côté serveur</text:p>
      <text:p text:style-name="P17">MySQL → Base de données centralisée</text:p>
      <text:p text:style-name="P18">Design &amp; Style:</text:p>
      <text:p text:style-name="P19">Responsive Design:</text:p>
      <text:list text:style-name="LFO8" text:continue-numbering="true">
        <text:list-item>
          <text:p text:style-name="P20">Adaptation mobile ≤ 768px</text:p>
        </text:list-item>
        <text:list-item>
          <text:p text:style-name="P21">Version desktop optimisée</text:p>
        </text:list-item>
        <text:list-item>
          <text:p text:style-name="P22">Réorganisation des tableaux et formulaires sur mobile</text:p>
        </text:list-item>
        <text:list-item>
          <text:p text:style-name="P23">Interface simple et intuitive</text:p>
        </text:list-item>
        <text:list-item>
          <text:p text:style-name="P24">Navigation claire adaptée aux utilisateurs non techniques</text:p>
        </text:list-item>
      </text:list>
      <text:p text:style-name="P25">Palette de couleurs:</text:p>
      <text:list text:style-name="LFO17" text:continue-numbering="true">
        <text:list-item>
          <text:p text:style-name="P26">Noir : #111111</text:p>
        </text:list-item>
        <text:list-item>
          <text:p text:style-name="P27">Blanc : #FFFFFF</text:p>
        </text:list-item>
        <text:list-item>
          <text:p text:style-name="P28">Fond clair : #f6f7fb</text:p>
        </text:list-item>
        <text:list-item>
          <text:p text:style-name="P29">Gris neutres : #e6e6e6, #fafafa, #555555</text:p>
        </text:list-item>
      </text:list>
      <text:p text:style-name="P30">Fonctionnalités principales:</text:p>
      <text:p text:style-name="P31">Gestion des utilisateurs</text:p>
      <text:list text:style-name="LFO9" text:continue-numbering="true">
        <text:list-item>
          <text:p text:style-name="P32">Création, modification et suppression de comptes</text:p>
        </text:list-item>
        <text:list-item>
          <text:p text:style-name="P33">Gestion des rôles :</text:p>
        </text:list-item>
      </text:list>
      <text:p text:style-name="P34"><text:span text:style-name="T35">Administrateur</text:span><text:span text:style-name="T36"><text:s/></text:span><text:span text:style-name="T37">→ Gestion complète</text:span></text:p>
      <text:p text:style-name="P38"><text:span text:style-name="T39">Bibliothécaire</text:span><text:span text:style-name="T40"><text:s/>→ Gestion adhérents + documents + emprunts</text:span></text:p>
      <text:p text:style-name="P41"><text:span text:style-name="T42">Adhérent</text:span><text:span text:style-name="T43"><text:s/>→ Consultation uniquement</text:span></text:p>
      <text:list text:style-name="LFO9" text:continue-numbering="true">
        <text:list-item>
          <text:p text:style-name="P44">Authentification sécurisée (login / mot de passe)</text:p>
        </text:list-item>
        <text:list-item>
          <text:p text:style-name="P45">Attribution automatique des droits</text:p>
        </text:list-item>
      </text:list>
      <text:p text:style-name="P46">Gestion des adhérents</text:p>
      <text:list text:style-name="LFO16" text:continue-numbering="true">
        <text:list-item>
          <text:p text:style-name="P47">Création et modification des fiches</text:p>
        </text:list-item>
        <text:list-item>
          <text:p text:style-name="P48">Suppression</text:p>
        </text:list-item>
        <text:list-item>
          <text:p text:style-name="P49">Recherche d’adhérents</text:p>
        </text:list-item>
        <text:list-item>
          <text:p text:style-name="P50">Consultation de l’historique des emprunts</text:p>
        </text:list-item>
      </text:list>
      <text:p text:style-name="P51">Gestion des documents</text:p>
      <text:list text:style-name="LFO11" text:continue-numbering="true">
        <text:list-item>
          <text:p text:style-name="P52">Ajout, modification, suppression</text:p>
        </text:list-item>
        <text:list-item>
          <text:p text:style-name="P53">Classement par type (livre, DVD, CD…)</text:p>
        </text:list-item>
        <text:list-item>
          <text:p text:style-name="P54">Consultation du stock disponible</text:p>
        </text:list-item>
        <text:list-item>
          <text:p text:style-name="P55">Vérification automatique de disponibilité</text:p>
        </text:list-item>
      </text:list>
      <text:p text:style-name="P56">Gestion des emprunts</text:p>
      <text:list text:style-name="LFO12" text:continue-numbering="true">
        <text:list-item>
          <text:p text:style-name="P57">Enregistrement des emprunts</text:p>
        </text:list-item>
        <text:list-item>
          <text:p text:style-name="P58">Gestion des retours</text:p>
        </text:list-item>
        <text:list-item>
          <text:p text:style-name="P59">Calcul automatique des dates de retour</text:p>
        </text:list-item>
        <text:list-item>
          <text:p text:style-name="P60">Historique complet des opérations</text:p>
        </text:list-item>
      </text:list>
      <text:p text:style-name="P61">Espace adhérent</text:p>
      <text:soft-page-break/>
      <text:list text:style-name="LFO13" text:continue-numbering="true">
        <text:list-item>
          <text:p text:style-name="P62">Consultation du catalogue</text:p>
        </text:list-item>
        <text:list-item>
          <text:p text:style-name="P63">Visualisation de ses emprunts</text:p>
        </text:list-item>
        <text:list-item>
          <text:p text:style-name="P64">Consultation de son profil</text:p>
        </text:list-item>
      </text:list>
      <text:p text:style-name="Normal"><text:span text:style-name="T65">Exigences non fonctionnelles</text:span><text:span text:style-name="T66"><text:s/></text:span><text:span text:style-name="T67">:</text:span></text:p>
      <text:list text:style-name="LFO6" text:continue-numbering="true">
        <text:list-item>
          <text:p text:style-name="P68">Accès sécurisé par identifiant/mot de passe</text:p>
        </text:list-item>
        <text:list-item>
          <text:p text:style-name="P69">Gestion des droits par rôle</text:p>
        </text:list-item>
        <text:list-item>
          <text:p text:style-name="P70">Protection des données personnelles (RGPD)</text:p>
        </text:list-item>
        <text:list-item>
          <text:p text:style-name="P71">Base de données centralisée</text:p>
        </text:list-item>
        <text:list-item>
          <text:p text:style-name="P72">Temps de réponse rapide</text:p>
        </text:list-item>
        <text:list-item>
          <text:p text:style-name="P73"><text:span text:style-name="T74">Archivage sécurisé</text:span></text:p>
        </text:list-item>
      </text:list>
      <text:p text:style-name="Normal"><text:span text:style-name="T75">Compétences développées</text:span><text:span text:style-name="T76"><text:s/></text:span><text:span text:style-name="T77">:</text:span></text:p>
      <text:list text:style-name="LFO18" text:continue-numbering="true">
        <text:list-item>
          <text:p text:style-name="P78">Conception à partir d’un cahier des charges</text:p>
        </text:list-item>
        <text:list-item>
          <text:p text:style-name="P79">Modélisation de base de données (MCD/MLD)</text:p>
        </text:list-item>
        <text:list-item>
          <text:p text:style-name="P80">Gestion des rôles et droits utilisateurs</text:p>
        </text:list-item>
        <text:list-item>
          <text:p text:style-name="P81">Développement CRUD complet</text:p>
        </text:list-item>
        <text:list-item>
          <text:p text:style-name="P82">Sécurisation d’une application web</text:p>
        </text:list-item>
        <text:list-item>
          <text:p text:style-name="P83">Respect des contraintes RGPD</text:p>
        </text:list-item>
        <text:list-item>
          <text:p text:style-name="P84"><text:span text:style-name="T85">Organisation et planification d’un projet</text:span></text:p>
        </text:list-item>
      </text:list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leli Mebarki</meta:initial-creator>
    <dc:creator>Thileli Mebarki</dc:creator>
    <meta:creation-date>2026-02-22T12:49:00Z</meta:creation-date>
    <dc:date>2026-02-22T13:10:00Z</dc:date>
    <meta:template xlink:href="Normal" xlink:type="simple"/>
    <meta:editing-cycles>3</meta:editing-cycles>
    <meta:editing-duration>PT1380S</meta:editing-duration>
    <meta:document-statistic meta:page-count="3" meta:paragraph-count="4" meta:word-count="331" meta:character-count="2219" meta:row-count="15" meta:non-whitespace-character-count="1892"/>
  </office:meta>
</office:document-meta>
</file>